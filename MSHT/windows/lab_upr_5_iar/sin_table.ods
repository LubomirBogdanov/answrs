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5346in" svg:y="0.0484in">
            <draw:object draw:notify-on-update-of-ranges="Sheet1.E1:Sheet1.E256 Sheet1.F1:Sheet1.F256 Sheet1.E1:Sheet1.E256 Sheet1.G1:Sheet1.G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6449in" svg:y="3.7815in">
            <draw:object draw:notify-on-update-of-ranges="Sheet1.E1:Sheet1.E256 Sheet1.I1:Sheet1.I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SIN(0.02454*[.E1])"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(255/2)*[.G1]" office:value-type="float" office:value="127.5" calcext:value-type="float">
            <text:p>127.5</text:p>
          </table:table-cell>
          <table:table-cell table:formula="of:=ROUND([.H1];0)"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SIN(0.098171875*[.E2])" office:value-type="float" office:value="0.0980142588467299" calcext:value-type="float">
            <text:p>0.0980142588467299</text:p>
          </table:table-cell>
          <table:table-cell table:formula="of:=[.F2]+1" office:value-type="float" office:value="1.09801425884673" calcext:value-type="float">
            <text:p>1.09801425884673</text:p>
          </table:table-cell>
          <table:table-cell table:formula="of:=(255/2)*[.G2]" office:value-type="float" office:value="139.996818002958" calcext:value-type="float">
            <text:p>139.996818002958</text:p>
          </table:table-cell>
          <table:table-cell table:formula="of:=ROUND([.H2];0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T=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IN(0.098171875*[.E3])" office:value-type="float" office:value="0.195084642433042" calcext:value-type="float">
            <text:p>0.195084642433042</text:p>
          </table:table-cell>
          <table:table-cell table:formula="of:=[.F3]+1" office:value-type="float" office:value="1.19508464243304" calcext:value-type="float">
            <text:p>1.19508464243304</text:p>
          </table:table-cell>
          <table:table-cell table:formula="of:=(255/2)*[.G3]" office:value-type="float" office:value="152.373291910213" calcext:value-type="float">
            <text:p>152.373291910213</text:p>
          </table:table-cell>
          <table:table-cell table:formula="of:=ROUND([.H3];0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2*pi = 6.2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IN(0.098171875*[.E4])" office:value-type="float" office:value="0.290276364997512" calcext:value-type="float">
            <text:p>0.290276364997512</text:p>
          </table:table-cell>
          <table:table-cell table:formula="of:=[.F4]+1" office:value-type="float" office:value="1.29027636499751" calcext:value-type="float">
            <text:p>1.29027636499751</text:p>
          </table:table-cell>
          <table:table-cell table:formula="of:=(255/2)*[.G4]" office:value-type="float" office:value="164.510236537183" calcext:value-type="float">
            <text:p>164.510236537183</text:p>
          </table:table-cell>
          <table:table-cell table:formula="of:=ROUND([.H4];0)" office:value-type="float" office:value="165" calcext:value-type="float">
            <text:p>16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IN(0.098171875*[.E5])" office:value-type="float" office:value="0.382672732245021" calcext:value-type="float">
            <text:p>0.382672732245021</text:p>
          </table:table-cell>
          <table:table-cell table:formula="of:=[.F5]+1" office:value-type="float" office:value="1.38267273224502" calcext:value-type="float">
            <text:p>1.38267273224502</text:p>
          </table:table-cell>
          <table:table-cell table:formula="of:=(255/2)*[.G5]" office:value-type="float" office:value="176.29077336124" calcext:value-type="float">
            <text:p>176.29077336124</text:p>
          </table:table-cell>
          <table:table-cell table:formula="of:=ROUND([.H5];0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2*pi/T = 0.0981718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IN(0.098171875*[.E6])" office:value-type="float" office:value="0.471383969093621" calcext:value-type="float">
            <text:p>0.471383969093621</text:p>
          </table:table-cell>
          <table:table-cell table:formula="of:=[.F6]+1" office:value-type="float" office:value="1.47138396909362" calcext:value-type="float">
            <text:p>1.47138396909362</text:p>
          </table:table-cell>
          <table:table-cell table:formula="of:=(255/2)*[.G6]" office:value-type="float" office:value="187.601456059437" calcext:value-type="float">
            <text:p>187.601456059437</text:p>
          </table:table-cell>
          <table:table-cell table:formula="of:=ROUND([.H6];0)"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IN(0.098171875*[.E7])" office:value-type="float" office:value="0.555555788189944" calcext:value-type="float">
            <text:p>0.555555788189944</text:p>
          </table:table-cell>
          <table:table-cell table:formula="of:=[.F7]+1" office:value-type="float" office:value="1.55555578818994" calcext:value-type="float">
            <text:p>1.55555578818994</text:p>
          </table:table-cell>
          <table:table-cell table:formula="of:=(255/2)*[.G7]" office:value-type="float" office:value="198.333362994218" calcext:value-type="float">
            <text:p>198.333362994218</text:p>
          </table:table-cell>
          <table:table-cell table:formula="of:=ROUND([.H7];0)" office:value-type="float" office:value="198" calcext:value-type="float">
            <text:p>19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SIN(0.098171875*[.E8])" office:value-type="float" office:value="0.634377616678528" calcext:value-type="float">
            <text:p>0.634377616678528</text:p>
          </table:table-cell>
          <table:table-cell table:formula="of:=[.F8]+1" office:value-type="float" office:value="1.63437761667853" calcext:value-type="float">
            <text:p>1.63437761667853</text:p>
          </table:table-cell>
          <table:table-cell table:formula="of:=(255/2)*[.G8]" office:value-type="float" office:value="208.383146126512" calcext:value-type="float">
            <text:p>208.383146126512</text:p>
          </table:table-cell>
          <table:table-cell table:formula="of:=ROUND([.H8];0)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sin(2*pi*x/T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IN(0.098171875*[.E9])" office:value-type="float" office:value="0.707090402001442" calcext:value-type="float">
            <text:p>0.707090402001442</text:p>
          </table:table-cell>
          <table:table-cell table:formula="of:=[.F9]+1" office:value-type="float" office:value="1.70709040200144" calcext:value-type="float">
            <text:p>1.70709040200144</text:p>
          </table:table-cell>
          <table:table-cell table:formula="of:=(255/2)*[.G9]" office:value-type="float" office:value="217.654026255184" calcext:value-type="float">
            <text:p>217.654026255184</text:p>
          </table:table-cell>
          <table:table-cell table:formula="of:=ROUND([.H9];0)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SIN(0.098171875*[.E10])" office:value-type="float" office:value="0.772993921558526" calcext:value-type="float">
            <text:p>0.772993921558526</text:p>
          </table:table-cell>
          <table:table-cell table:formula="of:=[.F10]+1" office:value-type="float" office:value="1.77299392155853" calcext:value-type="float">
            <text:p>1.77299392155853</text:p>
          </table:table-cell>
          <table:table-cell table:formula="of:=(255/2)*[.G10]" office:value-type="float" office:value="226.056724998712" calcext:value-type="float">
            <text:p>226.056724998712</text:p>
          </table:table-cell>
          <table:table-cell table:formula="of:=ROUND([.H10];0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Normalize: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IN(0.098171875*[.E11])" office:value-type="float" office:value="0.83145352583637" calcext:value-type="float">
            <text:p>0.83145352583637</text:p>
          </table:table-cell>
          <table:table-cell table:formula="of:=[.F11]+1" office:value-type="float" office:value="1.83145352583637" calcext:value-type="float">
            <text:p>1.83145352583637</text:p>
          </table:table-cell>
          <table:table-cell table:formula="of:=(255/2)*[.G11]" office:value-type="float" office:value="233.510324544137" calcext:value-type="float">
            <text:p>233.510324544137</text:p>
          </table:table-cell>
          <table:table-cell table:formula="of:=ROUND([.H11];0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Add +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IN(0.098171875*[.E12])" office:value-type="float" office:value="0.881906250069836" calcext:value-type="float">
            <text:p>0.881906250069836</text:p>
          </table:table-cell>
          <table:table-cell table:formula="of:=[.F12]+1" office:value-type="float" office:value="1.88190625006984" calcext:value-type="float">
            <text:p>1.88190625006984</text:p>
          </table:table-cell>
          <table:table-cell table:formula="of:=(255/2)*[.G12]" office:value-type="float" office:value="239.943046883904" calcext:value-type="float">
            <text:p>239.943046883904</text:p>
          </table:table-cell>
          <table:table-cell table:formula="of:=ROUND([.H12];0)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ult *(255/2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SIN(0.098171875*[.E13])" office:value-type="float" office:value="0.923866235580965" calcext:value-type="float">
            <text:p>0.923866235580965</text:p>
          </table:table-cell>
          <table:table-cell table:formula="of:=[.F13]+1" office:value-type="float" office:value="1.92386623558096" calcext:value-type="float">
            <text:p>1.92386623558096</text:p>
          </table:table-cell>
          <table:table-cell table:formula="of:=(255/2)*[.G13]" office:value-type="float" office:value="245.292945036573" calcext:value-type="float">
            <text:p>245.292945036573</text:p>
          </table:table-cell>
          <table:table-cell table:formula="of:=ROUND([.H13];0)" office:value-type="float" office:value="245" calcext:value-type="float">
            <text:p>24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SIN(0.098171875*[.E14])" office:value-type="float" office:value="0.956929408587863" calcext:value-type="float">
            <text:p>0.956929408587863</text:p>
          </table:table-cell>
          <table:table-cell table:formula="of:=[.F14]+1" office:value-type="float" office:value="1.95692940858786" calcext:value-type="float">
            <text:p>1.95692940858786</text:p>
          </table:table-cell>
          <table:table-cell table:formula="of:=(255/2)*[.G14]" office:value-type="float" office:value="249.508499594953" calcext:value-type="float">
            <text:p>249.508499594953</text:p>
          </table:table-cell>
          <table:table-cell table:formula="of:=ROUND([.H14];0)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2 → -1 +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SIN(0.098171875*[.E15])" office:value-type="float" office:value="0.98077737142677" calcext:value-type="float">
            <text:p>0.98077737142677</text:p>
          </table:table-cell>
          <table:table-cell table:formula="of:=[.F15]+1" office:value-type="float" office:value="1.98077737142677" calcext:value-type="float">
            <text:p>1.98077737142677</text:p>
          </table:table-cell>
          <table:table-cell table:formula="of:=(255/2)*[.G15]" office:value-type="float" office:value="252.549114856913" calcext:value-type="float">
            <text:p>252.549114856913</text:p>
          </table:table-cell>
          <table:table-cell table:formula="of:=ROUND([.H15];0)" office:value-type="float" office:value="253" calcext:value-type="float">
            <text:p>25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SIN(0.098171875*[.E16])" office:value-type="float" office:value="0.995180468714889" calcext:value-type="float">
            <text:p>0.995180468714889</text:p>
          </table:table-cell>
          <table:table-cell table:formula="of:=[.F16]+1" office:value-type="float" office:value="1.99518046871489" calcext:value-type="float">
            <text:p>1.99518046871489</text:p>
          </table:table-cell>
          <table:table-cell table:formula="of:=(255/2)*[.G16]" office:value-type="float" office:value="254.385509761148" calcext:value-type="float">
            <text:p>254.385509761148</text:p>
          </table:table-cell>
          <table:table-cell table:formula="of:=ROUND([.H16];0)" office:value-type="float" office:value="254" calcext:value-type="float">
            <text:p>254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IN(0.098171875*[.E17])" office:value-type="float" office:value="0.999999998926914" calcext:value-type="float">
            <text:p>0.999999998926914</text:p>
          </table:table-cell>
          <table:table-cell table:formula="of:=[.F17]+1" office:value-type="float" office:value="1.99999999892691" calcext:value-type="float">
            <text:p>1.99999999892691</text:p>
          </table:table-cell>
          <table:table-cell table:formula="of:=(255/2)*[.G17]" office:value-type="float" office:value="254.999999863182" calcext:value-type="float">
            <text:p>254.999999863182</text:p>
          </table:table-cell>
          <table:table-cell table:formula="of:=ROUND([.H17];0)" office:value-type="float" office:value="255" calcext:value-type="float">
            <text:p>25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SIN(0.098171875*[.E18])" office:value-type="float" office:value="0.995189550087818" calcext:value-type="float">
            <text:p>0.995189550087818</text:p>
          </table:table-cell>
          <table:table-cell table:formula="of:=[.F18]+1" office:value-type="float" office:value="1.99518955008782" calcext:value-type="float">
            <text:p>1.99518955008782</text:p>
          </table:table-cell>
          <table:table-cell table:formula="of:=(255/2)*[.G18]" office:value-type="float" office:value="254.386667636197" calcext:value-type="float">
            <text:p>254.386667636197</text:p>
          </table:table-cell>
          <table:table-cell table:formula="of:=ROUND([.H18];0)" office:value-type="float" office:value="254" calcext:value-type="float">
            <text:p>25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SIN(0.098171875*[.E19])" office:value-type="float" office:value="0.980795446719199" calcext:value-type="float">
            <text:p>0.980795446719199</text:p>
          </table:table-cell>
          <table:table-cell table:formula="of:=[.F19]+1" office:value-type="float" office:value="1.9807954467192" calcext:value-type="float">
            <text:p>1.9807954467192</text:p>
          </table:table-cell>
          <table:table-cell table:formula="of:=(255/2)*[.G19]" office:value-type="float" office:value="252.551419456698" calcext:value-type="float">
            <text:p>252.551419456698</text:p>
          </table:table-cell>
          <table:table-cell table:formula="of:=ROUND([.H19];0)" office:value-type="float" office:value="253" calcext:value-type="float">
            <text:p>25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SIN(0.098171875*[.E20])" office:value-type="float" office:value="0.956956303735103" calcext:value-type="float">
            <text:p>0.956956303735103</text:p>
          </table:table-cell>
          <table:table-cell table:formula="of:=[.F20]+1" office:value-type="float" office:value="1.9569563037351" calcext:value-type="float">
            <text:p>1.9569563037351</text:p>
          </table:table-cell>
          <table:table-cell table:formula="of:=(255/2)*[.G20]" office:value-type="float" office:value="249.511928726226" calcext:value-type="float">
            <text:p>249.511928726226</text:p>
          </table:table-cell>
          <table:table-cell table:formula="of:=ROUND([.H20];0)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SIN(0.098171875*[.E21])" office:value-type="float" office:value="0.92390169158331" calcext:value-type="float">
            <text:p>0.92390169158331</text:p>
          </table:table-cell>
          <table:table-cell table:formula="of:=[.F21]+1" office:value-type="float" office:value="1.92390169158331" calcext:value-type="float">
            <text:p>1.92390169158331</text:p>
          </table:table-cell>
          <table:table-cell table:formula="of:=(255/2)*[.G21]" office:value-type="float" office:value="245.297465676872" calcext:value-type="float">
            <text:p>245.297465676872</text:p>
          </table:table-cell>
          <table:table-cell table:formula="of:=ROUND([.H21];0)" office:value-type="float" office:value="245" calcext:value-type="float">
            <text:p>24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SIN(0.098171875*[.E22])" office:value-type="float" office:value="0.881949925486728" calcext:value-type="float">
            <text:p>0.881949925486728</text:p>
          </table:table-cell>
          <table:table-cell table:formula="of:=[.F22]+1" office:value-type="float" office:value="1.88194992548673" calcext:value-type="float">
            <text:p>1.88194992548673</text:p>
          </table:table-cell>
          <table:table-cell table:formula="of:=(255/2)*[.G22]" office:value-type="float" office:value="239.948615499558" calcext:value-type="float">
            <text:p>239.948615499558</text:p>
          </table:table-cell>
          <table:table-cell table:formula="of:=ROUND([.H22];0)" office:value-type="float" office:value="240" calcext:value-type="float">
            <text:p>24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SIN(0.098171875*[.E23])" office:value-type="float" office:value="0.831505000074457" calcext:value-type="float">
            <text:p>0.831505000074457</text:p>
          </table:table-cell>
          <table:table-cell table:formula="of:=[.F23]+1" office:value-type="float" office:value="1.83150500007446" calcext:value-type="float">
            <text:p>1.83150500007446</text:p>
          </table:table-cell>
          <table:table-cell table:formula="of:=(255/2)*[.G23]" office:value-type="float" office:value="233.516887509493" calcext:value-type="float">
            <text:p>233.516887509493</text:p>
          </table:table-cell>
          <table:table-cell table:formula="of:=ROUND([.H23];0)" office:value-type="float" office:value="234" calcext:value-type="float">
            <text:p>234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SIN(0.098171875*[.E24])" office:value-type="float" office:value="0.773052698921974" calcext:value-type="float">
            <text:p>0.773052698921974</text:p>
          </table:table-cell>
          <table:table-cell table:formula="of:=[.F24]+1" office:value-type="float" office:value="1.77305269892197" calcext:value-type="float">
            <text:p>1.77305269892197</text:p>
          </table:table-cell>
          <table:table-cell table:formula="of:=(255/2)*[.G24]" office:value-type="float" office:value="226.064219112552" calcext:value-type="float">
            <text:p>226.064219112552</text:p>
          </table:table-cell>
          <table:table-cell table:formula="of:=ROUND([.H24];0)" office:value-type="float" office:value="226" calcext:value-type="float">
            <text:p>226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SIN(0.098171875*[.E25])" office:value-type="float" office:value="0.707155916465472" calcext:value-type="float">
            <text:p>0.707155916465472</text:p>
          </table:table-cell>
          <table:table-cell table:formula="of:=[.F25]+1" office:value-type="float" office:value="1.70715591646547" calcext:value-type="float">
            <text:p>1.70715591646547</text:p>
          </table:table-cell>
          <table:table-cell table:formula="of:=(255/2)*[.G25]" office:value-type="float" office:value="217.662379349348" calcext:value-type="float">
            <text:p>217.662379349348</text:p>
          </table:table-cell>
          <table:table-cell table:formula="of:=ROUND([.H25];0)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SIN(0.098171875*[.E26])" office:value-type="float" office:value="0.634449237340223" calcext:value-type="float">
            <text:p>0.634449237340223</text:p>
          </table:table-cell>
          <table:table-cell table:formula="of:=[.F26]+1" office:value-type="float" office:value="1.63444923734022" calcext:value-type="float">
            <text:p>1.63444923734022</text:p>
          </table:table-cell>
          <table:table-cell table:formula="of:=(255/2)*[.G26]" office:value-type="float" office:value="208.392277760878" calcext:value-type="float">
            <text:p>208.392277760878</text:p>
          </table:table-cell>
          <table:table-cell table:formula="of:=ROUND([.H26];0)" office:value-type="float" office:value="208" calcext:value-type="float">
            <text:p>208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SIN(0.098171875*[.E27])" office:value-type="float" office:value="0.555632825343831" calcext:value-type="float">
            <text:p>0.555632825343831</text:p>
          </table:table-cell>
          <table:table-cell table:formula="of:=[.F27]+1" office:value-type="float" office:value="1.55563282534383" calcext:value-type="float">
            <text:p>1.55563282534383</text:p>
          </table:table-cell>
          <table:table-cell table:formula="of:=(255/2)*[.G27]" office:value-type="float" office:value="198.343185231338" calcext:value-type="float">
            <text:p>198.343185231338</text:p>
          </table:table-cell>
          <table:table-cell table:formula="of:=ROUND([.H27];0)" office:value-type="float" office:value="198" calcext:value-type="float">
            <text:p>19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SIN(0.098171875*[.E28])" office:value-type="float" office:value="0.471465680873522" calcext:value-type="float">
            <text:p>0.471465680873522</text:p>
          </table:table-cell>
          <table:table-cell table:formula="of:=[.F28]+1" office:value-type="float" office:value="1.47146568087352" calcext:value-type="float">
            <text:p>1.47146568087352</text:p>
          </table:table-cell>
          <table:table-cell table:formula="of:=(255/2)*[.G28]" office:value-type="float" office:value="187.611874311374" calcext:value-type="float">
            <text:p>187.611874311374</text:p>
          </table:table-cell>
          <table:table-cell table:formula="of:=ROUND([.H28];0)"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SIN(0.098171875*[.E29])" office:value-type="float" office:value="0.382758331768206" calcext:value-type="float">
            <text:p>0.382758331768206</text:p>
          </table:table-cell>
          <table:table-cell table:formula="of:=[.F29]+1" office:value-type="float" office:value="1.38275833176821" calcext:value-type="float">
            <text:p>1.38275833176821</text:p>
          </table:table-cell>
          <table:table-cell table:formula="of:=(255/2)*[.G29]" office:value-type="float" office:value="176.301687300446" calcext:value-type="float">
            <text:p>176.301687300446</text:p>
          </table:table-cell>
          <table:table-cell table:formula="of:=ROUND([.H29];0)"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SIN(0.098171875*[.E30])" office:value-type="float" office:value="0.290365027942365" calcext:value-type="float">
            <text:p>0.290365027942365</text:p>
          </table:table-cell>
          <table:table-cell table:formula="of:=[.F30]+1" office:value-type="float" office:value="1.29036502794236" calcext:value-type="float">
            <text:p>1.29036502794236</text:p>
          </table:table-cell>
          <table:table-cell table:formula="of:=(255/2)*[.G30]" office:value-type="float" office:value="164.521541062652" calcext:value-type="float">
            <text:p>164.521541062652</text:p>
          </table:table-cell>
          <table:table-cell table:formula="of:=ROUND([.H30];0)" office:value-type="float" office:value="165" calcext:value-type="float">
            <text:p>16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SIN(0.098171875*[.E31])" office:value-type="float" office:value="0.19517551497726" calcext:value-type="float">
            <text:p>0.19517551497726</text:p>
          </table:table-cell>
          <table:table-cell table:formula="of:=[.F31]+1" office:value-type="float" office:value="1.19517551497726" calcext:value-type="float">
            <text:p>1.19517551497726</text:p>
          </table:table-cell>
          <table:table-cell table:formula="of:=(255/2)*[.G31]" office:value-type="float" office:value="152.384878159601" calcext:value-type="float">
            <text:p>152.384878159601</text:p>
          </table:table-cell>
          <table:table-cell table:formula="of:=ROUND([.H31];0)"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SIN(0.098171875*[.E32])" office:value-type="float" office:value="0.0981064658896151" calcext:value-type="float">
            <text:p>0.0981064658896151</text:p>
          </table:table-cell>
          <table:table-cell table:formula="of:=[.F32]+1" office:value-type="float" office:value="1.09810646588962" calcext:value-type="float">
            <text:p>1.09810646588962</text:p>
          </table:table-cell>
          <table:table-cell table:formula="of:=(255/2)*[.G32]" office:value-type="float" office:value="140.008574400926" calcext:value-type="float">
            <text:p>140.008574400926</text:p>
          </table:table-cell>
          <table:table-cell table:formula="of:=ROUND([.H32];0)"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IN(0.098171875*[.E33])" office:value-type="float" office:value="0.0000926535896604903" calcext:value-type="float">
            <text:p>9.26535896604903E-05</text:p>
          </table:table-cell>
          <table:table-cell table:formula="of:=[.F33]+1" office:value-type="float" office:value="1.00009265358966" calcext:value-type="float">
            <text:p>1.00009265358966</text:p>
          </table:table-cell>
          <table:table-cell table:formula="of:=(255/2)*[.G33]" office:value-type="float" office:value="127.511813332682" calcext:value-type="float">
            <text:p>127.511813332682</text:p>
          </table:table-cell>
          <table:table-cell table:formula="of:=ROUND([.H33];0)"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SIN(0.098171875*[.E34])" office:value-type="float" office:value="-0.0979220509624226" calcext:value-type="float">
            <text:p>-0.0979220509624226</text:p>
          </table:table-cell>
          <table:table-cell table:formula="of:=[.F34]+1" office:value-type="float" office:value="0.902077949037577" calcext:value-type="float">
            <text:p>0.902077949037577</text:p>
          </table:table-cell>
          <table:table-cell table:formula="of:=(255/2)*[.G34]" office:value-type="float" office:value="115.014938502291" calcext:value-type="float">
            <text:p>115.014938502291</text:p>
          </table:table-cell>
          <table:table-cell table:formula="of:=ROUND([.H34];0)" office:value-type="float" office:value="115" calcext:value-type="float">
            <text:p>11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SIN(0.098171875*[.E35])" office:value-type="float" office:value="-0.194993768214083" calcext:value-type="float">
            <text:p>-0.194993768214083</text:p>
          </table:table-cell>
          <table:table-cell table:formula="of:=[.F35]+1" office:value-type="float" office:value="0.805006231785917" calcext:value-type="float">
            <text:p>0.805006231785917</text:p>
          </table:table-cell>
          <table:table-cell table:formula="of:=(255/2)*[.G35]" office:value-type="float" office:value="102.638294552704" calcext:value-type="float">
            <text:p>102.638294552704</text:p>
          </table:table-cell>
          <table:table-cell table:formula="of:=ROUND([.H35];0)"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SIN(0.098171875*[.E36])" office:value-type="float" office:value="-0.290187699560728" calcext:value-type="float">
            <text:p>-0.290187699560728</text:p>
          </table:table-cell>
          <table:table-cell table:formula="of:=[.F36]+1" office:value-type="float" office:value="0.709812300439273" calcext:value-type="float">
            <text:p>0.709812300439273</text:p>
          </table:table-cell>
          <table:table-cell table:formula="of:=(255/2)*[.G36]" office:value-type="float" office:value="90.5010683060072" calcext:value-type="float">
            <text:p>90.5010683060072</text:p>
          </table:table-cell>
          <table:table-cell table:formula="of:=ROUND([.H36];0)"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SIN(0.098171875*[.E37])" office:value-type="float" office:value="-0.382587129436711" calcext:value-type="float">
            <text:p>-0.382587129436711</text:p>
          </table:table-cell>
          <table:table-cell table:formula="of:=[.F37]+1" office:value-type="float" office:value="0.617412870563289" calcext:value-type="float">
            <text:p>0.617412870563289</text:p>
          </table:table-cell>
          <table:table-cell table:formula="of:=(255/2)*[.G37]" office:value-type="float" office:value="78.7201409968194" calcext:value-type="float">
            <text:p>78.7201409968194</text:p>
          </table:table-cell>
          <table:table-cell table:formula="of:=ROUND([.H37];0)"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SIN(0.098171875*[.E38])" office:value-type="float" office:value="-0.471302253267036" calcext:value-type="float">
            <text:p>-0.471302253267036</text:p>
          </table:table-cell>
          <table:table-cell table:formula="of:=[.F38]+1" office:value-type="float" office:value="0.528697746732964" calcext:value-type="float">
            <text:p>0.528697746732964</text:p>
          </table:table-cell>
          <table:table-cell table:formula="of:=(255/2)*[.G38]" office:value-type="float" office:value="67.4089627084529" calcext:value-type="float">
            <text:p>67.4089627084529</text:p>
          </table:table-cell>
          <table:table-cell table:formula="of:=ROUND([.H38];0)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SIN(0.098171875*[.E39])" office:value-type="float" office:value="-0.555478746266784" calcext:value-type="float">
            <text:p>-0.555478746266784</text:p>
          </table:table-cell>
          <table:table-cell table:formula="of:=[.F39]+1" office:value-type="float" office:value="0.444521253733216" calcext:value-type="float">
            <text:p>0.444521253733216</text:p>
          </table:table-cell>
          <table:table-cell table:formula="of:=(255/2)*[.G39]" office:value-type="float" office:value="56.6764598509851" calcext:value-type="float">
            <text:p>56.6764598509851</text:p>
          </table:table-cell>
          <table:table-cell table:formula="of:=ROUND([.H39];0)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SIN(0.098171875*[.E40])" office:value-type="float" office:value="-0.634305990570899" calcext:value-type="float">
            <text:p>-0.634305990570899</text:p>
          </table:table-cell>
          <table:table-cell table:formula="of:=[.F40]+1" office:value-type="float" office:value="0.365694009429101" calcext:value-type="float">
            <text:p>0.365694009429101</text:p>
          </table:table-cell>
          <table:table-cell table:formula="of:=(255/2)*[.G40]" office:value-type="float" office:value="46.6259862022104" calcext:value-type="float">
            <text:p>46.6259862022104</text:p>
          </table:table-cell>
          <table:table-cell table:formula="of:=ROUND([.H40];0)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SIN(0.098171875*[.E41])" office:value-type="float" office:value="-0.707024881467261" calcext:value-type="float">
            <text:p>-0.707024881467261</text:p>
          </table:table-cell>
          <table:table-cell table:formula="of:=[.F41]+1" office:value-type="float" office:value="0.292975118532739" calcext:value-type="float">
            <text:p>0.292975118532739</text:p>
          </table:table-cell>
          <table:table-cell table:formula="of:=(255/2)*[.G41]" office:value-type="float" office:value="37.3543276129242" calcext:value-type="float">
            <text:p>37.3543276129242</text:p>
          </table:table-cell>
          <table:table-cell table:formula="of:=ROUND([.H41];0)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SIN(0.098171875*[.E42])" office:value-type="float" office:value="-0.772935137559166" calcext:value-type="float">
            <text:p>-0.772935137559166</text:p>
          </table:table-cell>
          <table:table-cell table:formula="of:=[.F42]+1" office:value-type="float" office:value="0.227064862440834" calcext:value-type="float">
            <text:p>0.227064862440834</text:p>
          </table:table-cell>
          <table:table-cell table:formula="of:=(255/2)*[.G42]" office:value-type="float" office:value="28.9507699612064" calcext:value-type="float">
            <text:p>28.9507699612064</text:p>
          </table:table-cell>
          <table:table-cell table:formula="of:=ROUND([.H42];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SIN(0.098171875*[.E43])" office:value-type="float" office:value="-0.831402044460513" calcext:value-type="float">
            <text:p>-0.831402044460513</text:p>
          </table:table-cell>
          <table:table-cell table:formula="of:=[.F43]+1" office:value-type="float" office:value="0.168597955539487" calcext:value-type="float">
            <text:p>0.168597955539487</text:p>
          </table:table-cell>
          <table:table-cell table:formula="of:=(255/2)*[.G43]" office:value-type="float" office:value="21.4962393312846" calcext:value-type="float">
            <text:p>21.4962393312846</text:p>
          </table:table-cell>
          <table:table-cell table:formula="of:=ROUND([.H43];0)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SIN(0.098171875*[.E44])" office:value-type="float" office:value="-0.881862567082055" calcext:value-type="float">
            <text:p>-0.881862567082055</text:p>
          </table:table-cell>
          <table:table-cell table:formula="of:=[.F44]+1" office:value-type="float" office:value="0.118137432917945" calcext:value-type="float">
            <text:p>0.118137432917945</text:p>
          </table:table-cell>
          <table:table-cell table:formula="of:=(255/2)*[.G44]" office:value-type="float" office:value="15.062522697038" calcext:value-type="float">
            <text:p>15.062522697038</text:p>
          </table:table-cell>
          <table:table-cell table:formula="of:=ROUND([.H44];0)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SIN(0.098171875*[.E45])" office:value-type="float" office:value="-0.923830771647516" calcext:value-type="float">
            <text:p>-0.923830771647516</text:p>
          </table:table-cell>
          <table:table-cell table:formula="of:=[.F45]+1" office:value-type="float" office:value="0.0761692283524843" calcext:value-type="float">
            <text:p>0.0761692283524843</text:p>
          </table:table-cell>
          <table:table-cell table:formula="of:=(255/2)*[.G45]" office:value-type="float" office:value="9.71157661494175" calcext:value-type="float">
            <text:p>9.71157661494175</text:p>
          </table:table-cell>
          <table:table-cell table:formula="of:=ROUND([.H45];0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SIN(0.098171875*[.E46])" office:value-type="float" office:value="-0.956902505225683" calcext:value-type="float">
            <text:p>-0.956902505225683</text:p>
          </table:table-cell>
          <table:table-cell table:formula="of:=[.F46]+1" office:value-type="float" office:value="0.0430974947743166" calcext:value-type="float">
            <text:p>0.0430974947743166</text:p>
          </table:table-cell>
          <table:table-cell table:formula="of:=(255/2)*[.G46]" office:value-type="float" office:value="5.49493058372536" calcext:value-type="float">
            <text:p>5.49493058372536</text:p>
          </table:table-cell>
          <table:table-cell table:formula="of:=ROUND([.H46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SIN(0.098171875*[.E47])" office:value-type="float" office:value="-0.980759287714674" calcext:value-type="float">
            <text:p>-0.980759287714674</text:p>
          </table:table-cell>
          <table:table-cell table:formula="of:=[.F47]+1" office:value-type="float" office:value="0.0192407122853258" calcext:value-type="float">
            <text:p>0.0192407122853258</text:p>
          </table:table-cell>
          <table:table-cell table:formula="of:=(255/2)*[.G47]" office:value-type="float" office:value="2.45319081637903" calcext:value-type="float">
            <text:p>2.45319081637903</text:p>
          </table:table-cell>
          <table:table-cell table:formula="of:=ROUND([.H47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SIN(0.098171875*[.E48])" office:value-type="float" office:value="-0.995171378798645" calcext:value-type="float">
            <text:p>-0.995171378798645</text:p>
          </table:table-cell>
          <table:table-cell table:formula="of:=[.F48]+1" office:value-type="float" office:value="0.00482862120135463" calcext:value-type="float">
            <text:p>0.00482862120135463</text:p>
          </table:table-cell>
          <table:table-cell table:formula="of:=(255/2)*[.G48]" office:value-type="float" office:value="0.615649203172716" calcext:value-type="float">
            <text:p>0.615649203172716</text:p>
          </table:table-cell>
          <table:table-cell table:formula="of:=ROUND([.H48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SIN(0.098171875*[.E49])" office:value-type="float" office:value="-0.999999990342226" calcext:value-type="float">
            <text:p>-0.999999990342226</text:p>
          </table:table-cell>
          <table:table-cell table:formula="of:=[.F49]+1" office:value-type="float" office:value="0.00000000965777369188459" calcext:value-type="float">
            <text:p>9.65777369188459E-09</text:p>
          </table:table-cell>
          <table:table-cell table:formula="of:=(255/2)*[.G49]" office:value-type="float" office:value="0.00000123136614571528" calcext:value-type="float">
            <text:p>1.23136614571528E-06</text:p>
          </table:table-cell>
          <table:table-cell table:formula="of:=ROUND([.H49]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SIN(0.098171875*[.E50])" office:value-type="float" office:value="-0.995198622917357" calcext:value-type="float">
            <text:p>-0.995198622917357</text:p>
          </table:table-cell>
          <table:table-cell table:formula="of:=[.F50]+1" office:value-type="float" office:value="0.00480137708264328" calcext:value-type="float">
            <text:p>0.00480137708264328</text:p>
          </table:table-cell>
          <table:table-cell table:formula="of:=(255/2)*[.G50]" office:value-type="float" office:value="0.612175578037018" calcext:value-type="float">
            <text:p>0.612175578037018</text:p>
          </table:table-cell>
          <table:table-cell table:formula="of:=ROUND([.H50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SIN(0.098171875*[.E51])" office:value-type="float" office:value="-0.980813513591804" calcext:value-type="float">
            <text:p>-0.980813513591804</text:p>
          </table:table-cell>
          <table:table-cell table:formula="of:=[.F51]+1" office:value-type="float" office:value="0.0191864864081956" calcext:value-type="float">
            <text:p>0.0191864864081956</text:p>
          </table:table-cell>
          <table:table-cell table:formula="of:=(255/2)*[.G51]" office:value-type="float" office:value="2.44627701704495" calcext:value-type="float">
            <text:p>2.44627701704495</text:p>
          </table:table-cell>
          <table:table-cell table:formula="of:=ROUND([.H51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SIN(0.098171875*[.E52])" office:value-type="float" office:value="-0.956983190667171" calcext:value-type="float">
            <text:p>-0.956983190667171</text:p>
          </table:table-cell>
          <table:table-cell table:formula="of:=[.F52]+1" office:value-type="float" office:value="0.0430168093328289" calcext:value-type="float">
            <text:p>0.0430168093328289</text:p>
          </table:table-cell>
          <table:table-cell table:formula="of:=(255/2)*[.G52]" office:value-type="float" office:value="5.48464318993569" calcext:value-type="float">
            <text:p>5.48464318993569</text:p>
          </table:table-cell>
          <table:table-cell table:formula="of:=ROUND([.H52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SIN(0.098171875*[.E53])" office:value-type="float" office:value="-0.923937139654249" calcext:value-type="float">
            <text:p>-0.923937139654249</text:p>
          </table:table-cell>
          <table:table-cell table:formula="of:=[.F53]+1" office:value-type="float" office:value="0.0760628603457514" calcext:value-type="float">
            <text:p>0.0760628603457514</text:p>
          </table:table-cell>
          <table:table-cell table:formula="of:=(255/2)*[.G53]" office:value-type="float" office:value="9.6980146940833" calcext:value-type="float">
            <text:p>9.6980146940833</text:p>
          </table:table-cell>
          <table:table-cell table:formula="of:=ROUND([.H53];0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SIN(0.098171875*[.E54])" office:value-type="float" office:value="-0.881993593332355" calcext:value-type="float">
            <text:p>-0.881993593332355</text:p>
          </table:table-cell>
          <table:table-cell table:formula="of:=[.F54]+1" office:value-type="float" office:value="0.118006406667645" calcext:value-type="float">
            <text:p>0.118006406667645</text:p>
          </table:table-cell>
          <table:table-cell table:formula="of:=(255/2)*[.G54]" office:value-type="float" office:value="15.0458168501247" calcext:value-type="float">
            <text:p>15.0458168501247</text:p>
          </table:table-cell>
          <table:table-cell table:formula="of:=ROUND([.H54];0)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SIN(0.098171875*[.E55])" office:value-type="float" office:value="-0.831556467174334" calcext:value-type="float">
            <text:p>-0.831556467174334</text:p>
          </table:table-cell>
          <table:table-cell table:formula="of:=[.F55]+1" office:value-type="float" office:value="0.168443532825666" calcext:value-type="float">
            <text:p>0.168443532825666</text:p>
          </table:table-cell>
          <table:table-cell table:formula="of:=(255/2)*[.G55]" office:value-type="float" office:value="21.4765504352724" calcext:value-type="float">
            <text:p>21.4765504352724</text:p>
          </table:table-cell>
          <table:table-cell table:formula="of:=ROUND([.H55];0)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SIN(0.098171875*[.E56])" office:value-type="float" office:value="-0.773111469649007" calcext:value-type="float">
            <text:p>-0.773111469649007</text:p>
          </table:table-cell>
          <table:table-cell table:formula="of:=[.F56]+1" office:value-type="float" office:value="0.226888530350993" calcext:value-type="float">
            <text:p>0.226888530350993</text:p>
          </table:table-cell>
          <table:table-cell table:formula="of:=(255/2)*[.G56]" office:value-type="float" office:value="28.9282876197516" calcext:value-type="float">
            <text:p>28.9282876197516</text:p>
          </table:table-cell>
          <table:table-cell table:formula="of:=ROUND([.H56];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SIN(0.098171875*[.E57])" office:value-type="float" office:value="-0.707221424858789" calcext:value-type="float">
            <text:p>-0.707221424858789</text:p>
          </table:table-cell>
          <table:table-cell table:formula="of:=[.F57]+1" office:value-type="float" office:value="0.292778575141211" calcext:value-type="float">
            <text:p>0.292778575141211</text:p>
          </table:table-cell>
          <table:table-cell table:formula="of:=(255/2)*[.G57]" office:value-type="float" office:value="37.3292683305044" calcext:value-type="float">
            <text:p>37.3292683305044</text:p>
          </table:table-cell>
          <table:table-cell table:formula="of:=ROUND([.H57];0)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SIN(0.098171875*[.E58])" office:value-type="float" office:value="-0.634520852555369" calcext:value-type="float">
            <text:p>-0.634520852555369</text:p>
          </table:table-cell>
          <table:table-cell table:formula="of:=[.F58]+1" office:value-type="float" office:value="0.365479147444631" calcext:value-type="float">
            <text:p>0.365479147444631</text:p>
          </table:table-cell>
          <table:table-cell table:formula="of:=(255/2)*[.G58]" office:value-type="float" office:value="46.5985912991905" calcext:value-type="float">
            <text:p>46.5985912991905</text:p>
          </table:table-cell>
          <table:table-cell table:formula="of:=ROUND([.H58];0)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SIN(0.098171875*[.E59])" office:value-type="float" office:value="-0.555709857727784" calcext:value-type="float">
            <text:p>-0.555709857727784</text:p>
          </table:table-cell>
          <table:table-cell table:formula="of:=[.F59]+1" office:value-type="float" office:value="0.444290142272216" calcext:value-type="float">
            <text:p>0.444290142272216</text:p>
          </table:table-cell>
          <table:table-cell table:formula="of:=(255/2)*[.G59]" office:value-type="float" office:value="56.6469931397076" calcext:value-type="float">
            <text:p>56.6469931397076</text:p>
          </table:table-cell>
          <table:table-cell table:formula="of:=ROUND([.H59];0)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SIN(0.098171875*[.E60])" office:value-type="float" office:value="-0.471547388606037" calcext:value-type="float">
            <text:p>-0.471547388606037</text:p>
          </table:table-cell>
          <table:table-cell table:formula="of:=[.F60]+1" office:value-type="float" office:value="0.528452611393963" calcext:value-type="float">
            <text:p>0.528452611393963</text:p>
          </table:table-cell>
          <table:table-cell table:formula="of:=(255/2)*[.G60]" office:value-type="float" office:value="67.3777079527303" calcext:value-type="float">
            <text:p>67.3777079527303</text:p>
          </table:table-cell>
          <table:table-cell table:formula="of:=ROUND([.H60];0)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SIN(0.098171875*[.E61])" office:value-type="float" office:value="-0.38284392800553" calcext:value-type="float">
            <text:p>-0.38284392800553</text:p>
          </table:table-cell>
          <table:table-cell table:formula="of:=[.F61]+1" office:value-type="float" office:value="0.61715607199447" calcext:value-type="float">
            <text:p>0.61715607199447</text:p>
          </table:table-cell>
          <table:table-cell table:formula="of:=(255/2)*[.G61]" office:value-type="float" office:value="78.687399179295" calcext:value-type="float">
            <text:p>78.687399179295</text:p>
          </table:table-cell>
          <table:table-cell table:formula="of:=ROUND([.H61];0)"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SIN(0.098171875*[.E62])" office:value-type="float" office:value="-0.290453688394524" calcext:value-type="float">
            <text:p>-0.290453688394524</text:p>
          </table:table-cell>
          <table:table-cell table:formula="of:=[.F62]+1" office:value-type="float" office:value="0.709546311605476" calcext:value-type="float">
            <text:p>0.709546311605476</text:p>
          </table:table-cell>
          <table:table-cell table:formula="of:=(255/2)*[.G62]" office:value-type="float" office:value="90.4671547296982" calcext:value-type="float">
            <text:p>90.4671547296982</text:p>
          </table:table-cell>
          <table:table-cell table:formula="of:=ROUND([.H62];0)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SIN(0.098171875*[.E63])" office:value-type="float" office:value="-0.195266385845957" calcext:value-type="float">
            <text:p>-0.195266385845957</text:p>
          </table:table-cell>
          <table:table-cell table:formula="of:=[.F63]+1" office:value-type="float" office:value="0.804733614154043" calcext:value-type="float">
            <text:p>0.804733614154043</text:p>
          </table:table-cell>
          <table:table-cell table:formula="of:=(255/2)*[.G63]" office:value-type="float" office:value="102.603535804641" calcext:value-type="float">
            <text:p>102.603535804641</text:p>
          </table:table-cell>
          <table:table-cell table:formula="of:=ROUND([.H63];0)"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SIN(0.098171875*[.E64])" office:value-type="float" office:value="-0.0981986720902876" calcext:value-type="float">
            <text:p>-0.0981986720902876</text:p>
          </table:table-cell>
          <table:table-cell table:formula="of:=[.F64]+1" office:value-type="float" office:value="0.901801327909712" calcext:value-type="float">
            <text:p>0.901801327909712</text:p>
          </table:table-cell>
          <table:table-cell table:formula="of:=(255/2)*[.G64]" office:value-type="float" office:value="114.979669308488" calcext:value-type="float">
            <text:p>114.979669308488</text:p>
          </table:table-cell>
          <table:table-cell table:formula="of:=ROUND([.H64];0)"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0T15:37:00.500920900</meta:creation-date>
    <dc:date>2026-05-20T17:14:17.034780400</dc:date>
    <meta:editing-duration>PT56M10S</meta:editing-duration>
    <meta:editing-cycles>17</meta:editing-cycles>
    <meta:generator>LibreOffice/25.2.7.2$Windows_X86_64 LibreOffice_project/5cbfd1ab6520636bb5f7b99185aa69bd7456825d</meta:generator>
    <meta:document-statistic meta:table-count="1" meta:cell-count="32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8cm" svg:y="3.952cm" style:legend-expansion="high" chart:style-name="ch2"/>
        <chart:plot-area chart:style-name="ch3" svg:x="0.32cm" svg:y="0.18cm" svg:width="12.468cm" svg:height="8.64cm">
          <chart:coordinate-region svg:x="1.164cm" svg:y="0.379cm" svg:width="11.43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256" chart:class="chart:scatter">
            <chart:domain table:cell-range-address="Sheet1.E1:Sheet1.E256"/>
            <chart:data-point chart:repeated="256"/>
          </chart:series>
          <chart:series chart:style-name="ch8" chart:values-cell-range-address="Sheet1.G1:Sheet1.G256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256</svg:desc>
                </draw:g>
              </table:table-cell>
              <table:table-cell office:value-type="float" office:value="0">
                <text:p>0</text:p>
                <draw:g>
                  <svg:desc>Sheet1.F1:Sheet1.F256</svg:desc>
                </draw:g>
              </table:table-cell>
              <table:table-cell office:value-type="float" office:value="1">
                <text:p>1</text:p>
                <draw:g>
                  <svg:desc>Sheet1.G1:Sheet1.G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980142588467299">
                <text:p>0.0980142588467299</text:p>
              </table:table-cell>
              <table:table-cell office:value-type="float" office:value="1.09801425884673">
                <text:p>1.09801425884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95084642433042">
                <text:p>0.195084642433042</text:p>
              </table:table-cell>
              <table:table-cell office:value-type="float" office:value="1.19508464243304">
                <text:p>1.19508464243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90276364997512">
                <text:p>0.290276364997512</text:p>
              </table:table-cell>
              <table:table-cell office:value-type="float" office:value="1.29027636499751">
                <text:p>1.29027636499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2672732245021">
                <text:p>0.382672732245021</text:p>
              </table:table-cell>
              <table:table-cell office:value-type="float" office:value="1.38267273224502">
                <text:p>1.38267273224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71383969093621">
                <text:p>0.471383969093621</text:p>
              </table:table-cell>
              <table:table-cell office:value-type="float" office:value="1.47138396909362">
                <text:p>1.47138396909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55555788189944">
                <text:p>0.555555788189944</text:p>
              </table:table-cell>
              <table:table-cell office:value-type="float" office:value="1.55555578818994">
                <text:p>1.5555557881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4377616678528">
                <text:p>0.634377616678528</text:p>
              </table:table-cell>
              <table:table-cell office:value-type="float" office:value="1.63437761667853">
                <text:p>1.63437761667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07090402001442">
                <text:p>0.707090402001442</text:p>
              </table:table-cell>
              <table:table-cell office:value-type="float" office:value="1.70709040200144">
                <text:p>1.70709040200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72993921558526">
                <text:p>0.772993921558526</text:p>
              </table:table-cell>
              <table:table-cell office:value-type="float" office:value="1.77299392155853">
                <text:p>1.77299392155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3145352583637">
                <text:p>0.83145352583637</text:p>
              </table:table-cell>
              <table:table-cell office:value-type="float" office:value="1.83145352583637">
                <text:p>1.83145352583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1906250069836">
                <text:p>0.881906250069836</text:p>
              </table:table-cell>
              <table:table-cell office:value-type="float" office:value="1.88190625006984">
                <text:p>1.88190625006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23866235580965">
                <text:p>0.923866235580965</text:p>
              </table:table-cell>
              <table:table-cell office:value-type="float" office:value="1.92386623558096">
                <text:p>1.92386623558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56929408587863">
                <text:p>0.956929408587863</text:p>
              </table:table-cell>
              <table:table-cell office:value-type="float" office:value="1.95692940858786">
                <text:p>1.95692940858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8077737142677">
                <text:p>0.98077737142677</text:p>
              </table:table-cell>
              <table:table-cell office:value-type="float" office:value="1.98077737142677">
                <text:p>1.98077737142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5180468714889">
                <text:p>0.995180468714889</text:p>
              </table:table-cell>
              <table:table-cell office:value-type="float" office:value="1.99518046871489">
                <text:p>1.99518046871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9999998926914">
                <text:p>0.999999998926914</text:p>
              </table:table-cell>
              <table:table-cell office:value-type="float" office:value="1.99999999892691">
                <text:p>1.99999999892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95189550087818">
                <text:p>0.995189550087818</text:p>
              </table:table-cell>
              <table:table-cell office:value-type="float" office:value="1.99518955008782">
                <text:p>1.99518955008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80795446719199">
                <text:p>0.980795446719199</text:p>
              </table:table-cell>
              <table:table-cell office:value-type="float" office:value="1.9807954467192">
                <text:p>1.9807954467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6956303735103">
                <text:p>0.956956303735103</text:p>
              </table:table-cell>
              <table:table-cell office:value-type="float" office:value="1.9569563037351">
                <text:p>1.95695630373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390169158331">
                <text:p>0.92390169158331</text:p>
              </table:table-cell>
              <table:table-cell office:value-type="float" office:value="1.92390169158331">
                <text:p>1.92390169158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81949925486728">
                <text:p>0.881949925486728</text:p>
              </table:table-cell>
              <table:table-cell office:value-type="float" office:value="1.88194992548673">
                <text:p>1.88194992548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831505000074457">
                <text:p>0.831505000074457</text:p>
              </table:table-cell>
              <table:table-cell office:value-type="float" office:value="1.83150500007446">
                <text:p>1.83150500007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73052698921974">
                <text:p>0.773052698921974</text:p>
              </table:table-cell>
              <table:table-cell office:value-type="float" office:value="1.77305269892197">
                <text:p>1.77305269892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07155916465472">
                <text:p>0.707155916465472</text:p>
              </table:table-cell>
              <table:table-cell office:value-type="float" office:value="1.70715591646547">
                <text:p>1.70715591646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34449237340223">
                <text:p>0.634449237340223</text:p>
              </table:table-cell>
              <table:table-cell office:value-type="float" office:value="1.63444923734022">
                <text:p>1.63444923734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55632825343831">
                <text:p>0.555632825343831</text:p>
              </table:table-cell>
              <table:table-cell office:value-type="float" office:value="1.55563282534383">
                <text:p>1.55563282534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71465680873522">
                <text:p>0.471465680873522</text:p>
              </table:table-cell>
              <table:table-cell office:value-type="float" office:value="1.47146568087352">
                <text:p>1.4714656808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82758331768206">
                <text:p>0.382758331768206</text:p>
              </table:table-cell>
              <table:table-cell office:value-type="float" office:value="1.38275833176821">
                <text:p>1.38275833176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0365027942365">
                <text:p>0.290365027942365</text:p>
              </table:table-cell>
              <table:table-cell office:value-type="float" office:value="1.29036502794236">
                <text:p>1.29036502794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517551497726">
                <text:p>0.19517551497726</text:p>
              </table:table-cell>
              <table:table-cell office:value-type="float" office:value="1.19517551497726">
                <text:p>1.19517551497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81064658896151">
                <text:p>0.0981064658896151</text:p>
              </table:table-cell>
              <table:table-cell office:value-type="float" office:value="1.09810646588962">
                <text:p>1.09810646588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926535896604903">
                <text:p>0.0000926535896604903</text:p>
              </table:table-cell>
              <table:table-cell office:value-type="float" office:value="1.00009265358966">
                <text:p>1.00009265358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979220509624226">
                <text:p>-0.0979220509624226</text:p>
              </table:table-cell>
              <table:table-cell office:value-type="float" office:value="0.902077949037577">
                <text:p>0.902077949037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194993768214083">
                <text:p>-0.194993768214083</text:p>
              </table:table-cell>
              <table:table-cell office:value-type="float" office:value="0.805006231785917">
                <text:p>0.805006231785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290187699560728">
                <text:p>-0.290187699560728</text:p>
              </table:table-cell>
              <table:table-cell office:value-type="float" office:value="0.709812300439273">
                <text:p>0.709812300439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382587129436711">
                <text:p>-0.382587129436711</text:p>
              </table:table-cell>
              <table:table-cell office:value-type="float" office:value="0.617412870563289">
                <text:p>0.617412870563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471302253267036">
                <text:p>-0.471302253267036</text:p>
              </table:table-cell>
              <table:table-cell office:value-type="float" office:value="0.528697746732964">
                <text:p>0.528697746732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55478746266784">
                <text:p>-0.555478746266784</text:p>
              </table:table-cell>
              <table:table-cell office:value-type="float" office:value="0.444521253733216">
                <text:p>0.444521253733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634305990570899">
                <text:p>-0.634305990570899</text:p>
              </table:table-cell>
              <table:table-cell office:value-type="float" office:value="0.365694009429101">
                <text:p>0.365694009429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707024881467261">
                <text:p>-0.707024881467261</text:p>
              </table:table-cell>
              <table:table-cell office:value-type="float" office:value="0.292975118532739">
                <text:p>0.292975118532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772935137559166">
                <text:p>-0.772935137559166</text:p>
              </table:table-cell>
              <table:table-cell office:value-type="float" office:value="0.227064862440834">
                <text:p>0.227064862440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31402044460513">
                <text:p>-0.831402044460513</text:p>
              </table:table-cell>
              <table:table-cell office:value-type="float" office:value="0.168597955539487">
                <text:p>0.168597955539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881862567082055">
                <text:p>-0.881862567082055</text:p>
              </table:table-cell>
              <table:table-cell office:value-type="float" office:value="0.118137432917945">
                <text:p>0.118137432917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923830771647516">
                <text:p>-0.923830771647516</text:p>
              </table:table-cell>
              <table:table-cell office:value-type="float" office:value="0.0761692283524843">
                <text:p>0.0761692283524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956902505225683">
                <text:p>-0.956902505225683</text:p>
              </table:table-cell>
              <table:table-cell office:value-type="float" office:value="0.0430974947743166">
                <text:p>0.0430974947743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980759287714674">
                <text:p>-0.980759287714674</text:p>
              </table:table-cell>
              <table:table-cell office:value-type="float" office:value="0.0192407122853258">
                <text:p>0.0192407122853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995171378798645">
                <text:p>-0.995171378798645</text:p>
              </table:table-cell>
              <table:table-cell office:value-type="float" office:value="0.00482862120135463">
                <text:p>0.00482862120135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999999990342226">
                <text:p>-0.999999990342226</text:p>
              </table:table-cell>
              <table:table-cell office:value-type="float" office:value="0.00000000965777369188459">
                <text:p>0.00000000965777369188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995198622917357">
                <text:p>-0.995198622917357</text:p>
              </table:table-cell>
              <table:table-cell office:value-type="float" office:value="0.00480137708264328">
                <text:p>0.00480137708264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980813513591804">
                <text:p>-0.980813513591804</text:p>
              </table:table-cell>
              <table:table-cell office:value-type="float" office:value="0.0191864864081956">
                <text:p>0.0191864864081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956983190667171">
                <text:p>-0.956983190667171</text:p>
              </table:table-cell>
              <table:table-cell office:value-type="float" office:value="0.0430168093328289">
                <text:p>0.0430168093328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923937139654249">
                <text:p>-0.923937139654249</text:p>
              </table:table-cell>
              <table:table-cell office:value-type="float" office:value="0.0760628603457514">
                <text:p>0.0760628603457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881993593332355">
                <text:p>-0.881993593332355</text:p>
              </table:table-cell>
              <table:table-cell office:value-type="float" office:value="0.118006406667645">
                <text:p>0.11800640666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831556467174334">
                <text:p>-0.831556467174334</text:p>
              </table:table-cell>
              <table:table-cell office:value-type="float" office:value="0.168443532825666">
                <text:p>0.168443532825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773111469649007">
                <text:p>-0.773111469649007</text:p>
              </table:table-cell>
              <table:table-cell office:value-type="float" office:value="0.226888530350993">
                <text:p>0.226888530350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707221424858789">
                <text:p>-0.707221424858789</text:p>
              </table:table-cell>
              <table:table-cell office:value-type="float" office:value="0.292778575141211">
                <text:p>0.292778575141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634520852555369">
                <text:p>-0.634520852555369</text:p>
              </table:table-cell>
              <table:table-cell office:value-type="float" office:value="0.365479147444631">
                <text:p>0.365479147444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555709857727784">
                <text:p>-0.555709857727784</text:p>
              </table:table-cell>
              <table:table-cell office:value-type="float" office:value="0.444290142272216">
                <text:p>0.444290142272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471547388606037">
                <text:p>-0.471547388606037</text:p>
              </table:table-cell>
              <table:table-cell office:value-type="float" office:value="0.528452611393963">
                <text:p>0.528452611393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38284392800553">
                <text:p>-0.38284392800553</text:p>
              </table:table-cell>
              <table:table-cell office:value-type="float" office:value="0.61715607199447">
                <text:p>0.61715607199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290453688394524">
                <text:p>-0.290453688394524</text:p>
              </table:table-cell>
              <table:table-cell office:value-type="float" office:value="0.709546311605476">
                <text:p>0.709546311605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95266385845957">
                <text:p>-0.195266385845957</text:p>
              </table:table-cell>
              <table:table-cell office:value-type="float" office:value="0.804733614154043">
                <text:p>0.804733614154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981986720902876">
                <text:p>-0.0981986720902876</text:p>
              </table:table-cell>
              <table:table-cell office:value-type="float" office:value="0.901801327909712">
                <text:p>0.901801327909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svg:x="0.32cm" svg:y="0.18cm" svg:width="12.64cm" svg:height="8.64cm">
          <chart:coordinate-region svg:x="1.145cm" svg:y="0.379cm" svg:width="11.6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:Sheet1.I256" chart:class="chart:scatter">
            <chart:domain table:cell-range-address="Sheet1.E1:Sheet1.E256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256</svg:desc>
                </draw:g>
              </table:table-cell>
              <table:table-cell office:value-type="float" office:value="128">
                <text:p>128</text:p>
                <draw:g>
                  <svg:desc>Sheet1.I1:Sheet1.I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